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uation_mape_by_dataset" table:style-name="ta1">
        <table:shapes>
          <draw:frame draw:z-index="0" draw:style-name="gr1" draw:text-style-name="P1" svg:width="6.2988in" svg:height="3.5429in" svg:x="12.3815in" svg:y="3.3228in">
            <draw:object draw:notify-on-update-of-ranges="evaluation_mape_by_dataset.C21:evaluation_mape_by_dataset.C21 evaluation_mape_by_dataset.C22:evaluation_mape_by_dataset.C31 evaluation_mape_by_dataset.D21:evaluation_mape_by_dataset.D21 evaluation_mape_by_dataset.D22:evaluation_mape_by_dataset.D31 evaluation_mape_by_dataset.E21:evaluation_mape_by_dataset.E21 evaluation_mape_by_dataset.E22:evaluation_mape_by_dataset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num_layers</text:p>
          </table:table-cell>
          <table:table-cell office:value-type="string" calcext:value-type="string">
            <text:p>model_state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FNWD</text:p>
          </table:table-cell>
          <table:table-cell office:value-type="string" calcext:value-type="string">
            <text:p>CFFN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FDBC</text:p>
          </table:table-cell>
          <table:table-cell office:value-type="string" calcext:value-type="string">
            <text:p>VABK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B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timal</text:p>
          </table:table-cell>
          <table:table-cell office:value-type="float" office:value="77.7104644775391" calcext:value-type="float">
            <text:p>77.7104644775391</text:p>
          </table:table-cell>
          <table:table-cell office:value-type="float" office:value="87.1004791259766" calcext:value-type="float">
            <text:p>87.1004791259766</text:p>
          </table:table-cell>
          <table:table-cell office:value-type="float" office:value="80.3035507202148" calcext:value-type="float">
            <text:p>80.3035507202148</text:p>
          </table:table-cell>
          <table:table-cell office:value-type="float" office:value="55.2937927246094" calcext:value-type="float">
            <text:p>55.2937927246094</text:p>
          </table:table-cell>
          <table:table-cell office:value-type="float" office:value="89.7976684570313" calcext:value-type="float">
            <text:p>89.7976684570313</text:p>
          </table:table-cell>
          <table:table-cell office:value-type="float" office:value="75.8564224243164" calcext:value-type="float">
            <text:p>75.8564224243164</text:p>
          </table:table-cell>
          <table:table-cell office:value-type="float" office:value="75.8664779663086" calcext:value-type="float">
            <text:p>75.8664779663086</text:p>
          </table:table-cell>
          <table:table-cell office:value-type="float" office:value="46.1600761413574" calcext:value-type="float">
            <text:p>46.1600761413574</text:p>
          </table:table-cell>
          <table:table-cell office:value-type="float" office:value="58.9394340515137" calcext:value-type="float">
            <text:p>58.9394340515137</text:p>
          </table:table-cell>
          <table:table-cell office:value-type="float" office:value="77.4808578491211" calcext:value-type="float">
            <text:p>77.480857849121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" table:number-columns-repeated="10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odel_state</text:p>
          </table:table-cell>
          <table:table-cell office:value-type="string" calcext:value-type="string">
            <text:p>retrained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ET</text:p>
          </table:table-cell>
          <table:table-cell office:value-type="float" office:value="77.7104644775391" calcext:value-type="float">
            <text:p>77.7104644775391</text:p>
          </table:table-cell>
          <table:table-cell office:value-type="float" office:value="19.4138946533203" calcext:value-type="float">
            <text:p>19.4138946533203</text:p>
          </table:table-cell>
          <table:table-cell table:style-name="ce2" table:formula="of:=[.D22]-[.E22]" office:value-type="float" office:value="58.2965698242188" calcext:value-type="float">
            <text:p>58.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JG</text:p>
          </table:table-cell>
          <table:table-cell office:value-type="float" office:value="87.1004791259766" calcext:value-type="float">
            <text:p>87.1004791259766</text:p>
          </table:table-cell>
          <table:table-cell office:value-type="float" office:value="40.3745841979981" calcext:value-type="float">
            <text:p>40.3745841979981</text:p>
          </table:table-cell>
          <table:table-cell table:style-name="ce2" table:formula="of:=[.D23]-[.E23]" office:value-type="float" office:value="46.7258949279785" calcext:value-type="float">
            <text:p>46.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NWD</text:p>
          </table:table-cell>
          <table:table-cell office:value-type="float" office:value="80.3035507202148" calcext:value-type="float">
            <text:p>80.3035507202148</text:p>
          </table:table-cell>
          <table:table-cell office:value-type="float" office:value="26.2844295501709" calcext:value-type="float">
            <text:p>26.2844295501709</text:p>
          </table:table-cell>
          <table:table-cell table:style-name="ce2" table:formula="of:=[.D24]-[.E24]" office:value-type="float" office:value="54.0191211700439" calcext:value-type="float">
            <text:p>54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FFN</text:p>
          </table:table-cell>
          <table:table-cell office:value-type="float" office:value="55.2937927246094" calcext:value-type="float">
            <text:p>55.2937927246094</text:p>
          </table:table-cell>
          <table:table-cell office:value-type="float" office:value="94.6372528076172" calcext:value-type="float">
            <text:p>94.6372528076172</text:p>
          </table:table-cell>
          <table:table-cell table:style-name="ce2" table:formula="of:=[.D25]-[.E25]" office:value-type="float" office:value="-39.3434600830078" calcext:value-type="float">
            <text:p>-39.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office:value-type="float" office:value="89.7976684570313" calcext:value-type="float">
            <text:p>89.7976684570313</text:p>
          </table:table-cell>
          <table:table-cell office:value-type="float" office:value="52.4419288635254" calcext:value-type="float">
            <text:p>52.4419288635254</text:p>
          </table:table-cell>
          <table:table-cell table:style-name="ce2" table:formula="of:=[.D26]-[.E26]" office:value-type="float" office:value="37.3557395935059" calcext:value-type="float">
            <text:p>37.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DBC</text:p>
          </table:table-cell>
          <table:table-cell office:value-type="float" office:value="75.8564224243164" calcext:value-type="float">
            <text:p>75.8564224243164</text:p>
          </table:table-cell>
          <table:table-cell office:value-type="float" office:value="41.9445915222168" calcext:value-type="float">
            <text:p>41.9445915222168</text:p>
          </table:table-cell>
          <table:table-cell table:style-name="ce2" table:formula="of:=[.D27]-[.E27]" office:value-type="float" office:value="33.9118309020996" calcext:value-type="float">
            <text:p>33.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BK</text:p>
          </table:table-cell>
          <table:table-cell office:value-type="float" office:value="75.8664779663086" calcext:value-type="float">
            <text:p>75.8664779663086</text:p>
          </table:table-cell>
          <table:table-cell office:value-type="float" office:value="32.4638023376465" calcext:value-type="float">
            <text:p>32.4638023376465</text:p>
          </table:table-cell>
          <table:table-cell table:style-name="ce2" table:formula="of:=[.D28]-[.E28]" office:value-type="float" office:value="43.4026756286621" calcext:value-type="float">
            <text:p>43.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CF</text:p>
          </table:table-cell>
          <table:table-cell office:value-type="float" office:value="46.1600761413574" calcext:value-type="float">
            <text:p>46.1600761413574</text:p>
          </table:table-cell>
          <table:table-cell office:value-type="float" office:value="136.260757446289" calcext:value-type="float">
            <text:p>136.260757446289</text:p>
          </table:table-cell>
          <table:table-cell table:style-name="ce2" table:formula="of:=[.D29]-[.E29]" office:value-type="float" office:value="-90.1006813049316" calcext:value-type="float">
            <text:p>-90.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FC</text:p>
          </table:table-cell>
          <table:table-cell office:value-type="float" office:value="58.9394340515137" calcext:value-type="float">
            <text:p>58.9394340515137</text:p>
          </table:table-cell>
          <table:table-cell office:value-type="float" office:value="95.8125152587891" calcext:value-type="float">
            <text:p>95.8125152587891</text:p>
          </table:table-cell>
          <table:table-cell table:style-name="ce2" table:formula="of:=[.D30]-[.E30]" office:value-type="float" office:value="-36.8730812072754" calcext:value-type="float">
            <text:p>-36.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SE</text:p>
          </table:table-cell>
          <table:table-cell office:value-type="float" office:value="77.4808578491211" calcext:value-type="float">
            <text:p>77.4808578491211</text:p>
          </table:table-cell>
          <table:table-cell office:value-type="float" office:value="38.0009231567383" calcext:value-type="float">
            <text:p>38.0009231567383</text:p>
          </table:table-cell>
          <table:table-cell table:style-name="ce2" table:formula="of:=[.D31]-[.E31]" office:value-type="float" office:value="39.4799346923828" calcext:value-type="float">
            <text:p>39.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9T12:36:08.881352026</dc:date>
    <meta:editing-duration>PT2H46M54S</meta:editing-duration>
    <meta:editing-cycles>2</meta:editing-cycles>
    <meta:generator>LibreOffice/24.2.7.2$Linux_X86_64 LibreOffice_project/420$Build-2</meta:generator>
    <meta:document-statistic meta:table-count="1" meta:cell-count="6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evaluation_mape_by_dataset.C21:evaluation_mape_by_dataset.E31" chart:data-source-has-labels="both" svg:x="0.32cm" svg:y="0.18cm" svg:width="12.667cm" svg:height="8.64cm">
          <chart:coordinate-region svg:x="1.127cm" svg:y="0.379cm" svg:width="11.395cm" svg:height="7.794cm"/>
          <chart:axis chart:dimension="x" chart:name="primary-x" chart:style-name="ch4" chartooo:axis-type="auto">
            <chartooo:date-scale/>
            <chart:categories table:cell-range-address="evaluation_mape_by_dataset.C22:evaluation_mape_by_dataset.C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valuation_mape_by_dataset.D22:evaluation_mape_by_dataset.D31" chart:label-cell-address="evaluation_mape_by_dataset.D21:evaluation_mape_by_dataset.D21" chart:class="chart:line">
            <chart:data-point chart:repeated="10"/>
          </chart:series>
          <chart:series chart:style-name="ch7" chart:values-cell-range-address="evaluation_mape_by_dataset.E22:evaluation_mape_by_dataset.E31" chart:label-cell-address="evaluation_mape_by_dataset.E21:evaluation_mape_by_dataset.E2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rained</text:p>
                <draw:g>
                  <svg:desc>evaluation_mape_by_dataset.D21:evaluation_mape_by_dataset.D21</svg:desc>
                </draw:g>
              </table:table-cell>
              <table:table-cell office:value-type="string">
                <text:p>original</text:p>
                <draw:g>
                  <svg:desc>evaluation_mape_by_dataset.E21:evaluation_mape_by_dataset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T</text:p>
                <draw:g>
                  <svg:desc>evaluation_mape_by_dataset.C22:evaluation_mape_by_dataset.C31</svg:desc>
                </draw:g>
              </table:table-cell>
              <table:table-cell office:value-type="float" office:value="77.7104644775391">
                <text:p>77.7104644775391</text:p>
                <draw:g>
                  <svg:desc>evaluation_mape_by_dataset.D22:evaluation_mape_by_dataset.D31</svg:desc>
                </draw:g>
              </table:table-cell>
              <table:table-cell office:value-type="float" office:value="19.4138946533203">
                <text:p>19.4138946533203</text:p>
                <draw:g>
                  <svg:desc>evaluation_mape_by_dataset.E22:evaluation_mape_by_dataset.E31</svg:desc>
                </draw:g>
              </table:table-cell>
            </table:table-row>
            <table:table-row>
              <table:table-cell office:value-type="string">
                <text:p>AJG</text:p>
              </table:table-cell>
              <table:table-cell office:value-type="float" office:value="87.1004791259766">
                <text:p>87.1004791259766</text:p>
              </table:table-cell>
              <table:table-cell office:value-type="float" office:value="40.3745841979981">
                <text:p>40.3745841979981</text:p>
              </table:table-cell>
            </table:table-row>
            <table:table-row>
              <table:table-cell office:value-type="string">
                <text:p>FNWD</text:p>
              </table:table-cell>
              <table:table-cell office:value-type="float" office:value="80.3035507202148">
                <text:p>80.3035507202148</text:p>
              </table:table-cell>
              <table:table-cell office:value-type="float" office:value="26.2844295501709">
                <text:p>26.2844295501709</text:p>
              </table:table-cell>
            </table:table-row>
            <table:table-row>
              <table:table-cell office:value-type="string">
                <text:p>CFFN</text:p>
              </table:table-cell>
              <table:table-cell office:value-type="float" office:value="55.2937927246094">
                <text:p>55.2937927246094</text:p>
              </table:table-cell>
              <table:table-cell office:value-type="float" office:value="94.6372528076172">
                <text:p>94.6372528076172</text:p>
              </table:table-cell>
            </table:table-row>
            <table:table-row>
              <table:table-cell office:value-type="string">
                <text:p>RY</text:p>
              </table:table-cell>
              <table:table-cell office:value-type="float" office:value="89.7976684570313">
                <text:p>89.7976684570313</text:p>
              </table:table-cell>
              <table:table-cell office:value-type="float" office:value="52.4419288635254">
                <text:p>52.4419288635254</text:p>
              </table:table-cell>
            </table:table-row>
            <table:table-row>
              <table:table-cell office:value-type="string">
                <text:p>FDBC</text:p>
              </table:table-cell>
              <table:table-cell office:value-type="float" office:value="75.8564224243164">
                <text:p>75.8564224243164</text:p>
              </table:table-cell>
              <table:table-cell office:value-type="float" office:value="41.9445915222168">
                <text:p>41.9445915222168</text:p>
              </table:table-cell>
            </table:table-row>
            <table:table-row>
              <table:table-cell office:value-type="string">
                <text:p>VABK</text:p>
              </table:table-cell>
              <table:table-cell office:value-type="float" office:value="75.8664779663086">
                <text:p>75.8664779663086</text:p>
              </table:table-cell>
              <table:table-cell office:value-type="float" office:value="32.4638023376465">
                <text:p>32.4638023376465</text:p>
              </table:table-cell>
            </table:table-row>
            <table:table-row>
              <table:table-cell office:value-type="string">
                <text:p>FCF</text:p>
              </table:table-cell>
              <table:table-cell office:value-type="float" office:value="46.1600761413574">
                <text:p>46.1600761413574</text:p>
              </table:table-cell>
              <table:table-cell office:value-type="float" office:value="136.260757446289">
                <text:p>136.260757446289</text:p>
              </table:table-cell>
            </table:table-row>
            <table:table-row>
              <table:table-cell office:value-type="string">
                <text:p>PFC</text:p>
              </table:table-cell>
              <table:table-cell office:value-type="float" office:value="58.9394340515137">
                <text:p>58.9394340515137</text:p>
              </table:table-cell>
              <table:table-cell office:value-type="float" office:value="95.8125152587891">
                <text:p>95.8125152587891</text:p>
              </table:table-cell>
            </table:table-row>
            <table:table-row>
              <table:table-cell office:value-type="string">
                <text:p>BUSE</text:p>
              </table:table-cell>
              <table:table-cell office:value-type="float" office:value="77.4808578491211">
                <text:p>77.4808578491211</text:p>
              </table:table-cell>
              <table:table-cell office:value-type="float" office:value="38.0009231567383">
                <text:p>38.0009231567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